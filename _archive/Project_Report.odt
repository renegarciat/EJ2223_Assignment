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AB0000027CE9D2DB84.png" manifest:media-type="image/png"/>
  <manifest:file-entry manifest:full-path="Pictures/100000010000007A00000014410144C9.png" manifest:media-type="image/png"/>
  <manifest:file-entry manifest:full-path="Pictures/100079CC00000C99000002182700FB88.svg" manifest:media-type="image/svg+xml"/>
  <manifest:file-entry manifest:full-path="Pictures/10000001000000B000000010ED79FDBC.png" manifest:media-type="image/png"/>
  <manifest:file-entry manifest:full-path="Pictures/1000759E0000122B000001A7B5C770EA.svg" manifest:media-type="image/svg+xml"/>
  <manifest:file-entry manifest:full-path="Pictures/100C920900003AA300001F313539CF6B.svg" manifest:media-type="image/svg+xml"/>
  <manifest:file-entry manifest:full-path="Pictures/10000001000000310000000C6ABA715B.png" manifest:media-type="image/png"/>
  <manifest:file-entry manifest:full-path="Pictures/10000000000002C800000361D36D5066.png" manifest:media-type="image/png"/>
  <manifest:file-entry manifest:full-path="Pictures/10000001000000310000000C13A08170.png" manifest:media-type="image/png"/>
  <manifest:file-entry manifest:full-path="Pictures/100A47AC000036680000243EF2FA5294.svg" manifest:media-type="image/svg+xml"/>
  <manifest:file-entry manifest:full-path="Pictures/10001A2B0000050400000138E335355C.svg" manifest:media-type="image/svg+xml"/>
  <manifest:file-entry manifest:full-path="Pictures/10000001000002370000012E896E3458.png" manifest:media-type="image/png"/>
  <manifest:file-entry manifest:full-path="Pictures/10000001000000500000000C1963E4BA.png" manifest:media-type="image/png"/>
  <manifest:file-entry manifest:full-path="Pictures/10002D470000083B00000134C8E98C5C.svg" manifest:media-type="image/svg+xml"/>
  <manifest:file-entry manifest:full-path="Pictures/100000010000036E000001AFDC2FE047.png" manifest:media-type="image/png"/>
  <manifest:file-entry manifest:full-path="Pictures/10002E1000000848000000FC597F30A1.svg" manifest:media-type="image/svg+xml"/>
  <manifest:file-entry manifest:full-path="Pictures/10004F8D00000BA0000003535B473429.svg" manifest:media-type="image/svg+xml"/>
  <manifest:file-entry manifest:full-path="Pictures/1000000000000462000008A0FE2FE35A.jpg" manifest:media-type="image/jpeg"/>
  <manifest:file-entry manifest:full-path="Pictures/10003C57000007DD000001E85325AF2E.svg" manifest:media-type="image/svg+xml"/>
  <manifest:file-entry manifest:full-path="Pictures/100000010000007000000020A4CA4E4E.png" manifest:media-type="image/png"/>
  <manifest:file-entry manifest:full-path="Pictures/10000001000000E50000000D4CE6E199.png" manifest:media-type="image/png"/>
  <manifest:file-entry manifest:full-path="Pictures/100000000000087000000F001350AB50.jpg" manifest:media-type="image/jpeg"/>
  <manifest:file-entry manifest:full-path="Pictures/1000610F000017B600000152185201CD.svg" manifest:media-type="image/svg+xml"/>
  <manifest:file-entry manifest:full-path="Pictures/100019000000051600000138C0AAA53E.svg" manifest:media-type="image/svg+xml"/>
  <manifest:file-entry manifest:full-path="Pictures/100000010000020E0000015F4DB0FCE3.png" manifest:media-type="image/png"/>
  <manifest:file-entry manifest:full-path="Pictures/10000000000006CA000002ED7762F77D.png" manifest:media-type="image/png"/>
  <manifest:file-entry manifest:full-path="Pictures/10000001000000500000000A64544F02.png" manifest:media-type="image/png"/>
  <manifest:file-entry manifest:full-path="Pictures/100000010000041800000248530F5387.png" manifest:media-type="image/png"/>
  <manifest:file-entry manifest:full-path="Pictures/100000010000002D0000000AD0FC244F.png" manifest:media-type="image/png"/>
  <manifest:file-entry manifest:full-path="Pictures/10000001000003580000034970E6B4ED.png" manifest:media-type="image/png"/>
  <manifest:file-entry manifest:full-path="Pictures/100000010000004C000000123382B319.png" manifest:media-type="image/png"/>
  <manifest:file-entry manifest:full-path="Pictures/10000000000006CA000002ED650F6C19.png" manifest:media-type="image/png"/>
  <manifest:file-entry manifest:full-path="Pictures/10000001000003A6000002E6736D771E.png" manifest:media-type="image/png"/>
  <manifest:file-entry manifest:full-path="Pictures/10000001000004F0000002F4869D2E68.png" manifest:media-type="image/png"/>
  <manifest:file-entry manifest:full-path="Pictures/10000F98000004A30000010F9A477E1B.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itle">
      <style:text-properties fo:font-size="26pt" style:font-size-asian="28pt" style:font-size-complex="28pt"/>
    </style:style>
    <style:style style:name="P2" style:family="paragraph" style:parent-style-name="Text_20_body">
      <style:text-properties fo:font-size="26pt" style:font-size-asian="28pt" style:font-size-complex="28pt"/>
    </style:style>
    <style:style style:name="P3" style:family="paragraph" style:parent-style-name="Contents_20_3">
      <style:paragraph-properties>
        <style:tab-stops>
          <style:tab-stop style:position="6.2984in" style:type="right" style:leader-style="dotted" style:leader-text="."/>
        </style:tab-stops>
      </style:paragraph-properties>
    </style:style>
    <style:style style:name="P4" style:family="paragraph" style:parent-style-name="Contents_20_4">
      <style:paragraph-properties>
        <style:tab-stops>
          <style:tab-stop style:position="6.102in" style:type="right" style:leader-style="dotted" style:leader-text="."/>
        </style:tab-stops>
      </style:paragraph-properties>
    </style:style>
    <style:style style:name="P5" style:family="paragraph" style:parent-style-name="Text_20_body">
      <style:text-properties officeooo:paragraph-rsid="00419be2"/>
    </style:style>
    <style:style style:name="P6" style:family="paragraph" style:parent-style-name="Heading_20_3">
      <style:text-properties fo:font-weight="bold" officeooo:rsid="0047adaa" officeooo:paragraph-rsid="0047adaa" style:font-weight-asian="bold" style:font-weight-complex="bold"/>
    </style:style>
    <style:style style:name="P7" style:family="paragraph" style:parent-style-name="Text_20_body">
      <style:paragraph-properties fo:text-align="justify" style:justify-single-word="false"/>
      <style:text-properties fo:font-weight="normal" officeooo:rsid="0047adaa" officeooo:paragraph-rsid="004ca793" style:font-weight-asian="normal" style:font-weight-complex="normal"/>
    </style:style>
    <style:style style:name="P8" style:family="paragraph" style:parent-style-name="Text_20_body">
      <style:paragraph-properties fo:text-align="justify" style:justify-single-word="false"/>
      <style:text-properties fo:font-weight="normal" officeooo:rsid="004ca793" officeooo:paragraph-rsid="004e8f9a" style:font-weight-asian="normal" style:font-weight-complex="normal"/>
    </style:style>
    <style:style style:name="P9" style:family="paragraph" style:parent-style-name="Text_20_body">
      <style:paragraph-properties fo:text-align="justify" style:justify-single-word="false" style:vertical-align="baseline">
        <style:tab-stops>
          <style:tab-stop style:position="3.3465in" style:type="center"/>
          <style:tab-stop style:position="6.6929in" style:type="right"/>
        </style:tab-stops>
      </style:paragraph-properties>
      <style:text-properties fo:font-weight="normal" officeooo:rsid="004e6813" officeooo:paragraph-rsid="00669884" style:font-weight-asian="normal" style:font-weight-complex="normal"/>
    </style:style>
    <style:style style:name="P1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1" style:family="paragraph" style:parent-style-name="Heading_20_3">
      <style:text-properties officeooo:paragraph-rsid="0042ed54"/>
    </style:style>
    <style:style style:name="P12" style:family="paragraph" style:parent-style-name="Text_20_body">
      <style:text-properties officeooo:rsid="004455b6" officeooo:paragraph-rsid="004455b6"/>
    </style:style>
    <style:style style:name="P13" style:family="paragraph" style:parent-style-name="Text_20_body">
      <style:text-properties officeooo:rsid="0055ec66" officeooo:paragraph-rsid="00598aa0"/>
    </style:style>
    <style:style style:name="P14" style:family="paragraph" style:parent-style-name="Text_20_body">
      <style:text-properties officeooo:paragraph-rsid="00598aa0"/>
    </style:style>
    <style:style style:name="P15" style:family="paragraph" style:parent-style-name="Heading_20_4">
      <style:paragraph-properties fo:keep-with-next="always"/>
      <style:text-properties style:font-name="Liberation Sans" style:font-name-asian="Noto Sans CJK SC" style:font-name-complex="Lohit Devanagari1"/>
    </style:style>
    <style:style style:name="P16" style:family="paragraph" style:parent-style-name="Text_20_body">
      <style:text-properties fo:font-weight="bold" officeooo:rsid="0055ec66" officeooo:paragraph-rsid="00598aa0" style:font-weight-asian="bold" style:font-weight-complex="bold"/>
    </style:style>
    <style:style style:name="P17" style:family="paragraph" style:parent-style-name="Text_20_body">
      <style:text-properties officeooo:rsid="0066d4ba" officeooo:paragraph-rsid="0066d4ba"/>
    </style:style>
    <style:style style:name="P18" style:family="paragraph" style:parent-style-name="Text_20_body">
      <style:text-properties officeooo:rsid="0051e81c" officeooo:paragraph-rsid="0051e81c"/>
    </style:style>
    <style:style style:name="P19" style:family="paragraph" style:parent-style-name="Text_20_body">
      <style:text-properties officeooo:rsid="00543281" officeooo:paragraph-rsid="00543281"/>
    </style:style>
    <style:style style:name="P20" style:family="paragraph" style:parent-style-name="Text_20_body">
      <style:paragraph-properties fo:text-align="start" style:justify-single-word="false"/>
    </style:style>
    <style:style style:name="P21" style:family="paragraph" style:parent-style-name="Text_20_body">
      <style:text-properties officeooo:rsid="00669884" officeooo:paragraph-rsid="00669884"/>
    </style:style>
    <style:style style:name="P22" style:family="paragraph" style:parent-style-name="Text_20_body">
      <style:paragraph-properties fo:text-align="start" style:justify-single-word="false"/>
      <style:text-properties officeooo:rsid="00669884" officeooo:paragraph-rsid="00669884"/>
    </style:style>
    <style:style style:name="P23" style:family="paragraph" style:parent-style-name="Text_20_body">
      <style:text-properties officeooo:rsid="00585986" officeooo:paragraph-rsid="00585986"/>
    </style:style>
    <style:style style:name="P24" style:family="paragraph" style:parent-style-name="Text_20_body">
      <style:text-properties officeooo:rsid="0055ec66" officeooo:paragraph-rsid="0055ec66"/>
    </style:style>
    <style:style style:name="P25" style:family="paragraph" style:parent-style-name="Heading_20_3">
      <style:text-properties officeooo:rsid="0042ed54" officeooo:paragraph-rsid="004a7348"/>
    </style:style>
    <style:style style:name="P26" style:family="paragraph" style:parent-style-name="Text_20_body">
      <style:text-properties officeooo:paragraph-rsid="0045fde9"/>
    </style:style>
    <style:style style:name="P27" style:family="paragraph" style:parent-style-name="Text_20_body">
      <style:text-properties fo:font-weight="normal" officeooo:rsid="0047adaa" officeooo:paragraph-rsid="00490776" style:font-weight-asian="normal" style:font-weight-complex="normal"/>
    </style:style>
    <style:style style:name="P28" style:family="paragraph" style:parent-style-name="Heading_20_3">
      <style:text-properties officeooo:rsid="001a4d07" officeooo:paragraph-rsid="001a4d07"/>
    </style:style>
    <style:style style:name="P29" style:family="paragraph" style:parent-style-name="Text_20_body">
      <style:text-properties officeooo:rsid="00167da4" officeooo:paragraph-rsid="00167da4"/>
    </style:style>
    <style:style style:name="P30" style:family="paragraph" style:parent-style-name="Text_20_body">
      <style:text-properties officeooo:rsid="001ecc56" officeooo:paragraph-rsid="001ecc56"/>
    </style:style>
    <style:style style:name="P31" style:family="paragraph" style:parent-style-name="Text_20_body">
      <style:text-properties officeooo:rsid="001ecc56" officeooo:paragraph-rsid="00203fcd"/>
    </style:style>
    <style:style style:name="P32" style:family="paragraph" style:parent-style-name="Text_20_body">
      <style:text-properties fo:font-weight="normal" officeooo:rsid="00238efc" officeooo:paragraph-rsid="00238efc" fo:background-color="transparent" style:font-weight-asian="normal" style:font-weight-complex="normal"/>
    </style:style>
    <style:style style:name="P33" style:family="paragraph" style:parent-style-name="Heading_20_3">
      <style:text-properties officeooo:paragraph-rsid="00220065"/>
    </style:style>
    <style:style style:name="P34" style:family="paragraph" style:parent-style-name="Standard">
      <style:text-properties officeooo:rsid="002d5904" officeooo:paragraph-rsid="002d5904"/>
    </style:style>
    <style:style style:name="P35" style:family="paragraph" style:parent-style-name="Heading_20_4">
      <style:text-properties officeooo:paragraph-rsid="00238efc"/>
    </style:style>
    <style:style style:name="P36" style:family="paragraph">
      <loext:graphic-properties draw:fill="none" draw:fill-color="#ffffff"/>
    </style:style>
    <style:style style:name="P37" style:family="paragraph">
      <style:paragraph-properties fo:text-align="center"/>
    </style:style>
    <style:style style:name="P38" style:family="paragraph" style:parent-style-name="Standard">
      <style:paragraph-properties fo:margin-top="0in" fo:margin-bottom="0in" style:contextual-spacing="false"/>
    </style:style>
    <style:style style:name="P39" style:family="paragraph" style:parent-style-name="Text_20_body">
      <style:text-properties officeooo:paragraph-rsid="00238efc"/>
    </style:style>
    <style:style style:name="P40" style:family="paragraph" style:parent-style-name="Heading_20_4">
      <style:text-properties fo:font-weight="normal" officeooo:rsid="00203fcd" officeooo:paragraph-rsid="0024cd86" style:font-weight-asian="normal" style:font-weight-complex="normal"/>
    </style:style>
    <style:style style:name="P41" style:family="paragraph" style:parent-style-name="Heading_20_4">
      <style:text-properties officeooo:paragraph-rsid="0024cd86"/>
    </style:style>
    <style:style style:name="P42" style:family="paragraph" style:parent-style-name="Text_20_body">
      <style:text-properties officeooo:rsid="002bff95" officeooo:paragraph-rsid="002bff95"/>
    </style:style>
    <style:style style:name="P43" style:family="paragraph" style:parent-style-name="Text_20_body">
      <style:text-properties officeooo:rsid="00220065" officeooo:paragraph-rsid="00220065"/>
    </style:style>
    <style:style style:name="P44" style:family="paragraph" style:parent-style-name="Text_20_body">
      <style:text-properties officeooo:rsid="00238efc" officeooo:paragraph-rsid="00238efc"/>
    </style:style>
    <style:style style:name="P45" style:family="paragraph" style:parent-style-name="Text_20_body">
      <style:text-properties officeooo:rsid="00203fcd" officeooo:paragraph-rsid="00203fcd"/>
    </style:style>
    <style:style style:name="P46" style:family="paragraph" style:parent-style-name="Text_20_body">
      <style:text-properties officeooo:rsid="0021a547" officeooo:paragraph-rsid="0021a547"/>
    </style:style>
    <style:style style:name="P47" style:family="paragraph" style:parent-style-name="Text_20_body">
      <style:text-properties officeooo:rsid="00220065" officeooo:paragraph-rsid="002a4535"/>
    </style:style>
    <style:style style:name="P48" style:family="paragraph" style:parent-style-name="Text_20_body">
      <style:text-properties officeooo:rsid="002a4535" officeooo:paragraph-rsid="002a4535"/>
    </style:style>
    <style:style style:name="P49" style:family="paragraph" style:parent-style-name="Text_20_body">
      <style:text-properties officeooo:rsid="003261b1" officeooo:paragraph-rsid="003261b1"/>
    </style:style>
    <style:style style:name="P50" style:family="paragraph" style:parent-style-name="Text_20_body">
      <style:paragraph-properties fo:text-align="start" style:justify-single-word="false"/>
      <style:text-properties officeooo:rsid="00344654" officeooo:paragraph-rsid="00344654"/>
    </style:style>
    <style:style style:name="P51" style:family="paragraph" style:parent-style-name="Standard">
      <style:text-properties officeooo:paragraph-rsid="0018fb0d"/>
    </style:style>
    <style:style style:name="P52" style:family="paragraph" style:parent-style-name="Standard">
      <style:text-properties officeooo:rsid="0018fb0d" officeooo:paragraph-rsid="0018fb0d" fo:background-color="#ffff00"/>
    </style:style>
    <style:style style:name="P53" style:family="paragraph" style:parent-style-name="Standard">
      <style:text-properties officeooo:rsid="000ec1f9" officeooo:paragraph-rsid="0018fb0d"/>
    </style:style>
    <style:style style:name="P54" style:family="paragraph" style:parent-style-name="Standard">
      <style:text-properties officeooo:rsid="000ec1f9" officeooo:paragraph-rsid="000ec1f9"/>
    </style:style>
    <style:style style:name="P55" style:family="paragraph" style:parent-style-name="Standard">
      <style:text-properties officeooo:rsid="000ff827" officeooo:paragraph-rsid="000ff827"/>
    </style:style>
    <style:style style:name="P56" style:family="paragraph" style:parent-style-name="Standard">
      <style:text-properties officeooo:rsid="0011cefd" officeooo:paragraph-rsid="0011cefd"/>
    </style:style>
    <style:style style:name="P57" style:family="paragraph" style:parent-style-name="Standard">
      <style:text-properties fo:font-weight="bold" officeooo:rsid="0013a7c7" officeooo:paragraph-rsid="0013a7c7" style:font-weight-asian="bold" style:font-weight-complex="bold"/>
    </style:style>
    <style:style style:name="T1" style:family="text">
      <style:text-properties officeooo:rsid="0047adaa"/>
    </style:style>
    <style:style style:name="T2" style:family="text">
      <style:text-properties officeooo:rsid="00490776"/>
    </style:style>
    <style:style style:name="T3" style:family="text">
      <style:text-properties officeooo:rsid="004e6813"/>
    </style:style>
    <style:style style:name="T4" style:family="text">
      <style:text-properties fo:font-weight="bold" style:font-weight-asian="bold" style:font-weight-complex="bold"/>
    </style:style>
    <style:style style:name="T5" style:family="text">
      <style:text-properties fo:font-weight="bold" officeooo:rsid="004e6813" style:font-weight-asian="bold" style:font-weight-complex="bold"/>
    </style:style>
    <style:style style:name="T6" style:family="text">
      <style:text-properties officeooo:rsid="004e8f9a"/>
    </style:style>
    <style:style style:name="T7" style:family="text">
      <style:text-properties officeooo:rsid="0064c75c"/>
    </style:style>
    <style:style style:name="T8" style:family="text">
      <style:text-properties style:text-position="0% 100%" officeooo:rsid="004e8f9a"/>
    </style:style>
    <style:style style:name="T9" style:family="text">
      <style:text-properties officeooo:rsid="00506bff"/>
    </style:style>
    <style:style style:name="T10" style:family="text">
      <style:text-properties fo:font-weight="bold" officeooo:rsid="0062e53c" style:font-weight-asian="bold" style:font-weight-complex="bold"/>
    </style:style>
    <style:style style:name="T11" style:family="text">
      <style:text-properties style:text-position="0% 100%" officeooo:rsid="0064c75c"/>
    </style:style>
    <style:style style:name="T12" style:family="text">
      <style:text-properties officeooo:rsid="00512dfb"/>
    </style:style>
    <style:style style:name="T13" style:family="text">
      <style:text-properties style:text-position="0% 100%" officeooo:rsid="00512dfb"/>
    </style:style>
    <style:style style:name="T14" style:family="text">
      <style:text-properties officeooo:rsid="0042ed54"/>
    </style:style>
    <style:style style:name="T15" style:family="text">
      <style:text-properties officeooo:rsid="004455b6"/>
    </style:style>
    <style:style style:name="T16" style:family="text">
      <style:text-properties officeooo:rsid="0051e81c"/>
    </style:style>
    <style:style style:name="T17" style:family="text">
      <style:text-properties officeooo:rsid="0066d4ba"/>
    </style:style>
    <style:style style:name="T18" style:family="text">
      <style:text-properties officeooo:rsid="0058177a"/>
    </style:style>
    <style:style style:name="T19" style:family="text">
      <style:text-properties officeooo:rsid="00578e0b"/>
    </style:style>
    <style:style style:name="T20" style:family="text">
      <style:text-properties officeooo:rsid="0045fde9"/>
    </style:style>
    <style:style style:name="T21" style:family="text">
      <style:text-properties fo:font-weight="bold" officeooo:rsid="0045fde9" style:font-weight-asian="bold" style:font-weight-complex="bold"/>
    </style:style>
    <style:style style:name="T22" style:family="text">
      <style:text-properties fo:font-weight="normal" officeooo:rsid="0045fde9" style:font-weight-asian="normal" style:font-weight-complex="normal"/>
    </style:style>
    <style:style style:name="T23" style:family="text">
      <style:text-properties officeooo:rsid="0064f1eb"/>
    </style:style>
    <style:style style:name="T24" style:family="text">
      <style:text-properties officeooo:rsid="00669884"/>
    </style:style>
    <style:style style:name="T25" style:family="text">
      <style:text-properties officeooo:rsid="00203fcd"/>
    </style:style>
    <style:style style:name="T26" style:family="text">
      <style:text-properties fo:font-weight="bold" officeooo:rsid="00203fcd" style:font-weight-asian="bold" style:font-weight-complex="bold"/>
    </style:style>
    <style:style style:name="T27" style:family="text">
      <style:text-properties fo:font-weight="normal" officeooo:rsid="00203fcd" style:font-weight-asian="normal" style:font-weight-complex="normal"/>
    </style:style>
    <style:style style:name="T28" style:family="text">
      <style:text-properties fo:font-weight="normal" officeooo:rsid="00203fcd" fo:background-color="#ffff00" loext:char-shading-value="0" style:font-weight-asian="normal" style:font-weight-complex="normal"/>
    </style:style>
    <style:style style:name="T29" style:family="text">
      <style:text-properties style:text-line-through-style="solid" style:text-line-through-type="single"/>
    </style:style>
    <style:style style:name="T30" style:family="text">
      <style:text-properties style:text-line-through-style="solid" style:text-line-through-type="single" fo:font-weight="bold" officeooo:rsid="002bff95" style:font-weight-asian="bold" style:font-weight-complex="bold"/>
    </style:style>
    <style:style style:name="T31" style:family="text">
      <style:text-properties style:text-line-through-style="solid" style:text-line-through-type="single" officeooo:rsid="002bff95"/>
    </style:style>
    <style:style style:name="T32" style:family="text">
      <style:text-properties officeooo:rsid="002bff95"/>
    </style:style>
    <style:style style:name="T33" style:family="text">
      <style:text-properties officeooo:rsid="002d5904"/>
    </style:style>
    <style:style style:name="T34" style:family="text">
      <style:text-properties officeooo:rsid="001ecc56"/>
    </style:style>
    <style:style style:name="T35" style:family="text">
      <style:text-properties officeooo:rsid="00238efc"/>
    </style:style>
    <style:style style:name="T36" style:family="text">
      <style:text-properties officeooo:rsid="0021a547"/>
    </style:style>
    <style:style style:name="T37" style:family="text">
      <style:text-properties fo:font-weight="bold" officeooo:rsid="0021a547" style:font-weight-asian="bold" style:font-weight-complex="bold"/>
    </style:style>
    <style:style style:name="T38" style:family="text">
      <style:text-properties officeooo:rsid="002a4535"/>
    </style:style>
    <style:style style:name="T39" style:family="text">
      <style:text-properties officeooo:rsid="002bd376"/>
    </style:style>
    <style:style style:name="T40" style:family="text">
      <style:text-properties officeooo:rsid="0018fb0d"/>
    </style:style>
    <style:style style:name="T41" style:family="text">
      <style:text-properties officeooo:rsid="001a4d07"/>
    </style:style>
    <style:style style:name="T42" style:family="text">
      <style:text-properties style:text-line-through-style="solid" style:text-line-through-type="single" officeooo:rsid="0030b356"/>
    </style:style>
    <style:style style:name="fr1"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false" loext:rel-width-rel="paragraph"/>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0201in" fo:border="none" draw:wrap-influence-on-position="once-concurrent" loext:allow-overlap="true">
        <style:columns fo:column-count="1" fo:column-gap="0in"/>
      </style:graphic-properties>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9.7402in, 0in, 8.4075in, 1.8654in)" draw:luminance="0%" draw:contrast="0%" draw:red="0%" draw:green="0%" draw:blue="0%" draw:gamma="100%" draw:color-inversion="false" draw:image-opacity="100%" draw:color-mode="standard" loext:rel-width-rel="paragraph" loext:decorative="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false"/>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Inline_20_Heading">
      <style:graphic-properties style:vertical-pos="from-top" style:horizontal-pos="from-left" style:horizontal-rel="paragraph-content"/>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3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2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575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1in" draw:marker-start-width="0.2874in" draw:marker-end="Arrow" draw:marker-end-width="0.2181in" draw:textarea-horizontal-align="center" draw:textarea-vertical-align="middle" fo:padding-top="0.0484in" fo:padding-bottom="0.0484in" fo:padding-left="0.0484in" fo:padding-right="0.048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1"><text:bookmark-start text:name="__RefHeading___Toc250_211697262"/>Interior Permanent Design Motor Design to Improve The Formula-E Team <text:span text:style-name="T1">Car’s Performance</text:span><text:bookmark-end text:name="__RefHeading___Toc250_211697262"/></text:p>
      <text:p text:style-name="P2"><draw:frame draw:style-name="fr1" draw:name="Image5" text:anchor-type="char" svg:x="2.098in" svg:y="0.0516in" svg:width="2.6772in" style:rel-width="40%" svg:height="2.5783in" draw:z-index="22"><draw:image xlink:href="Pictures/10000000000002C800000361D36D5066.png" xlink:type="simple" xlink:show="embed" xlink:actuate="onLoad" draw:mime-type="image/png"/></draw:frame></text:p>
      <text:p text:style-name="P2"/>
      <text:p text:style-name="P2"/>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1595_211697262" text:style-name="Index_20_Link" text:visited-style-name="Index_20_Link">Background: Current Motor Analysis<text:tab/>1</text:a></text:p>
          <text:p text:style-name="P3"><text:a xlink:type="simple" xlink:href="#__RefHeading___Toc1099_211697262" text:style-name="Index_20_Link" text:visited-style-name="Index_20_Link">Part A: Framework Definition And Initial Design<text:tab/>1</text:a></text:p>
          <text:p text:style-name="P3"><text:a xlink:type="simple" xlink:href="#__RefHeading___Toc1101_211697262" text:style-name="Index_20_Link" text:visited-style-name="Index_20_Link">Part B: Design Validation<text:tab/>1</text:a></text:p>
          <text:p text:style-name="P4"><text:a xlink:type="simple" xlink:href="#__RefHeading___Toc1103_211697262" text:style-name="Index_20_Link" text:visited-style-name="Index_20_Link">Electromechanical Analysis<text:tab/>2</text:a></text:p>
          <text:p text:style-name="P4"><text:a xlink:type="simple" xlink:href="#__RefHeading___Toc1105_211697262" text:style-name="Index_20_Link" text:visited-style-name="Index_20_Link">Thermal Analysis<text:tab/>2</text:a></text:p>
          <text:p text:style-name="P4"><text:a xlink:type="simple" xlink:href="#__RefHeading___Toc1107_211697262" text:style-name="Index_20_Link" text:visited-style-name="Index_20_Link">Mechanical Analysis<text:tab/>2</text:a></text:p>
          <text:p text:style-name="P3"><text:a xlink:type="simple" xlink:href="#__RefHeading___Toc1597_211697262" text:style-name="Index_20_Link" text:visited-style-name="Index_20_Link">Appendix<text:tab/>2</text:a></text:p>
          <text:p text:style-name="P4"><text:a xlink:type="simple" xlink:href="#__RefHeading___Toc1599_211697262" text:style-name="Index_20_Link" text:visited-style-name="Index_20_Link">DD5-14-10-POW Datasheet<text:tab/>2</text:a></text:p>
          <text:p text:style-name="P3"><text:a xlink:type="simple" xlink:href="#__RefHeading___Toc254_211697262" text:style-name="Index_20_Link" text:visited-style-name="Index_20_Link">Race Analysis Report<text:tab/>2</text:a></text:p>
          <text:p text:style-name="P3"><text:a xlink:type="simple" xlink:href="#__RefHeading___Toc256_211697262" text:style-name="Index_20_Link" text:visited-style-name="Index_20_Link">How Efficient Is The Current Motor?<text:tab/>3</text:a></text:p>
          <text:p text:style-name="P4"><text:a xlink:type="simple" xlink:href="#__RefHeading___Toc258_211697262" text:style-name="Index_20_Link" text:visited-style-name="Index_20_Link"><text:tab/>5</text:a></text:p>
          <text:p text:style-name="P4"><text:a xlink:type="simple" xlink:href="#__RefHeading___Toc260_211697262" text:style-name="Index_20_Link" text:visited-style-name="Index_20_Link">Ff<text:tab/>6</text:a></text:p>
          <text:p text:style-name="P4"><text:a xlink:type="simple" xlink:href="#__RefHeading___Toc262_211697262" text:style-name="Index_20_Link" text:visited-style-name="Index_20_Link"><text:s/>Requirements<text:tab/>6</text:a></text:p>
        </text:index-body>
      </text:table-of-content>
      <text:p text:style-name="P5"/>
      <text:h text:style-name="P6" text:outline-level="3"><text:bookmark-start text:name="__RefHeading___Toc1595_211697262"/>Background: Current Motor Analysis<draw:frame draw:style-name="fr2" draw:name="Frame2" text:anchor-type="char" svg:x="4.5098in" svg:y="0.0701in" svg:width="2.2161in" draw:z-index="20"><draw:text-box fo:min-height="2.022in"><text:p text:style-name="Figure"><draw:frame draw:style-name="fr3" draw:name="Image9" text:anchor-type="paragraph" svg:x="0in" svg:y="0.0835in" svg:width="2.1756in" style:rel-width="100%" svg:height="1.9854in" style:rel-height="scale" draw:z-index="21"><draw:image xlink:href="Pictures/1000000000000462000008A0FE2FE35A.jpg" xlink:type="simple" xlink:show="embed" xlink:actuate="onLoad" draw:mime-type="image/jpeg"/></draw:frame>Figure <text:sequence text:ref-name="refFigure0" text:name="Figure" text:formula="ooow:Figure+1" style:num-format="1">1</text:sequence>: Stator traversal cut</text:p></draw:text-box></draw:frame><text:bookmark-end text:name="__RefHeading___Toc1595_211697262"/></text:h>
      <text:p text:style-name="P7">The team is currently using the <text:a xlink:type="simple" xlink:href="#1.1.4.3.DD5-14-10-POW Datasheet|outline" text:style-name="Internet_20_link" text:visited-style-name="Visited_20_Internet_20_Link"><text:span text:style-name="T2">DD5-14-10-POW motor</text:span></text:a></text:p>
      <text:p text:style-name="P8"><text:span text:style-name="T3">From</text:span> the <text:span text:style-name="T3">Figure 1</text:span> we <text:span text:style-name="T3">can get some information; we c</text:span>an see <text:span text:style-name="T3">86 wire ends, which means the total number of turns per tooth is </text:span><text:span text:style-name="T4">4</text:span><text:span text:style-name="T5">3</text:span><text:span text:style-name="T3">.</text:span></text:p>
      <text:p text:style-name="P9"><text:span text:style-name="T6">Notice how, </text:span><text:span text:style-name="T7">in</text:span><text:span text:style-name="T6"> the data-sheet, </text:span><text:span text:style-name="T8"><draw:frame text:anchor-type="as-char" svg:y="-0.1181in" draw:z-index="26" draw:name="Shape1" draw:style-name="gr1" draw:text-style-name="P10" svg:width="1.0012in" svg:height="0.1185in"><draw:image xlink:href="Pictures/10002E1000000848000000FC597F30A1.svg" xlink:type="simple" xlink:show="embed" xlink:actuate="onLoad" draw:mime-type="image/svg+xml"><text:p/></draw:image><draw:image xlink:href="Pictures/10000001000000500000000A64544F02.png" xlink:type="simple" xlink:show="embed" xlink:actuate="onLoad" draw:mime-type="image/png"/><svg:title>TexMaths</svg:title><svg:desc>12§display§Ld=0.24 mH§svg§600§FALSE§</svg:desc></draw:frame></text:span><text:span text:style-name="T6"><text:s/>and </text:span><text:span text:style-name="T8"><draw:frame text:anchor-type="as-char" svg:y="-0.1126in" draw:z-index="27" draw:name="Shape2" draw:style-name="gr1" draw:text-style-name="P10" svg:width="0.9953in" svg:height="0.1453in"><draw:image xlink:href="Pictures/10002D470000083B00000134C8E98C5C.svg" xlink:type="simple" xlink:show="embed" xlink:actuate="onLoad" draw:mime-type="image/svg+xml"><text:p/></draw:image><draw:image xlink:href="Pictures/10000001000000500000000C1963E4BA.png" xlink:type="simple" xlink:show="embed" xlink:actuate="onLoad" draw:mime-type="image/png"/><svg:title>TexMaths</svg:title><svg:desc>12§display§Lq=0.12 mH§svg§600§FALSE§</svg:desc></draw:frame></text:span><text:span text:style-name="T6">, but we </text:span><text:span text:style-name="T9">know that in a </text:span><text:span text:style-name="T10">IPM</text:span><text:span text:style-name="T9">, usually </text:span><text:span text:style-name="T11"><draw:frame text:anchor-type="as-char" svg:y="-0.1146in" draw:z-index="28" draw:name="Shape3" draw:style-name="gr1" draw:text-style-name="P10" svg:width="0.6157in" svg:height="0.1469in"><draw:image xlink:href="Pictures/100019000000051600000138C0AAA53E.svg" xlink:type="simple" xlink:show="embed" xlink:actuate="onLoad" draw:mime-type="image/svg+xml"><text:p/></draw:image><draw:image xlink:href="Pictures/10000001000000310000000C13A08170.png" xlink:type="simple" xlink:show="embed" xlink:actuate="onLoad" draw:mime-type="image/png"/><svg:title>TexMaths</svg:title><svg:desc>12§display§$Lq \approx Ld$§svg§600§FALSE§</svg:desc></draw:frame></text:span><text:span text:style-name="T7"><text:tab/> </text:span><text:span text:style-name="T12">due the fact that magnets have approximately the same reluctance than the air </text:span><text:soft-page-break/><text:span text:style-name="T9">(check </text:span><text:a xlink:type="simple" xlink:href="#1.1.4.Appendix|outline" text:style-name="Internet_20_link" text:visited-style-name="Visited_20_Internet_20_Link"><text:span text:style-name="T9">Appendix</text:span></text:a><text:span text:style-name="T9">)</text:span><text:span text:style-name="T12">. This inverse saliency (</text:span><text:span text:style-name="T13"><draw:frame text:anchor-type="as-char" svg:y="-0.1146in" draw:z-index="30" draw:name="Shape4" draw:style-name="gr1" draw:text-style-name="P10" svg:width="0.6059in" svg:height="0.1469in"><draw:image xlink:href="Pictures/10001A2B0000050400000138E335355C.svg" xlink:type="simple" xlink:show="embed" xlink:actuate="onLoad" draw:mime-type="image/svg+xml"><text:p/></draw:image><draw:image xlink:href="Pictures/10000001000000310000000C6ABA715B.png" xlink:type="simple" xlink:show="embed" xlink:actuate="onLoad" draw:mime-type="image/png"/><svg:title>TexMaths</svg:title><svg:desc>12§display§Lq&lt;Ld§svg§600§FALSE§</svg:desc></draw:frame></text:span><text:span text:style-name="T12">) comes from the fact that magnets could be partially buried with iron shoes or a specific shape of the rotor. This can lead to “negative” reluctance when using the standard control.</text:span></text:p>
      <text:h text:style-name="P11" text:outline-level="3"><text:bookmark-start text:name="__RefHeading___Toc1099_211697262"/><text:span text:style-name="T14">Part A: </text:span><text:span text:style-name="T15">Framework Definition And Initial Design</text:span><text:bookmark-end text:name="__RefHeading___Toc1099_211697262"/></text:h>
      <text:p text:style-name="P12">The purpose of this part is to define the type of motor to be designed, the constraints (such as voltage, current and heat limitations), the requirements (such as speed and torque) and the software to be used.</text:p>
      <text:p text:style-name="P13">A surface permanent magnet motor, although simple and cheap, would need a very good glue in order to be able to withstand the 20,000 rpm centrifugal forces. Because of those reasons, we decide to proceed with an IPM Machine design.</text:p>
      <text:p text:style-name="P14"/>
      <text:h text:style-name="P15" text:outline-level="4">R<text:span text:style-name="T16">equirements </text:span><text:span text:style-name="T17">Boundaries</text:span></text:h>
      <text:p text:style-name="P13"/>
      <text:p text:style-name="P16"/>
      <text:p text:style-name="P17">After a discussion within the team, the following target requirements were derived:</text:p>
      <text:p text:style-name="P17"/>
      <text:p text:style-name="P12">The following requirements shall be validated in <text:span text:style-name="T4">Part B</text:span>.</text:p>
      <text:p text:style-name="P18">1. Ld shall be less than Lq.</text:p>
      <text:p text:style-name="P19">2. The <text:span text:style-name="T18">rotor </text:span>dimensions <text:span text:style-name="T19">should not exceed </text:span><text:span text:style-name="T18">80mm of diameter and </text:span></text:p>
      <text:p text:style-name="P20"><draw:frame text:anchor-type="as-char" svg:y="-1.8862in" draw:z-index="31" draw:name="Shape5" draw:style-name="gr1" draw:text-style-name="P10" svg:width="7.0921in" svg:height="3.7717in"><draw:image xlink:href="Pictures/100C920900003AA300001F313539CF6B.svg" xlink:type="simple" xlink:show="embed" xlink:actuate="onLoad" draw:mime-type="image/svg+xml"><text:p/></draw:image><draw:image xlink:href="Pictures/10000001000002370000012E896E3458.png" xlink:type="simple" xlink:show="embed" xlink:actuate="onLoad" draw:mime-type="image/png"/><svg:title>TexMaths</svg:title><svg:desc>12§latex§\begin{table}[h!]
\centering
\caption{New Design Requirements with Engineering Justification}
\label{tab:motor_design_data}
\begin{tabular}{p{3.5cm} l l p{7cm}}
\hline
\textit{Design Decision} &amp; \textit{Symbol} &amp; \textit{Value} &amp; \textit{Engineering Explanation / Justification} \\ \hline
Target Peak Power &amp; $P_{peak}$ &amp; 28 kW &amp; Sized to maximize the AMK RACING KIT inverter capacity (26 kVA per channel) while respecting the 515V DC bus voltage limit. \\
Clipped Peak Torque &amp; $M_{clip}$ &amp; 18 Nm &amp; Imposed as a software/team "clip" to ensure mechanical reliability of the transmission and to manage thermal saturation in the stator. \\
Target Max Speed &amp; $n_{target}$ &amp; 12,000 rpm &amp; Determined by the AMK inverter's 1200 Hz switching limit; at 12,000 rpm, a 10-pole motor operates at 1000 Hz, providing a 20\% safety margin. \\
Gear Ratio (Fixed) &amp; $G$ &amp; 14:1 &amp; Fixed by the current car's powertrain package to multiply low-speed torque for optimal acceleration out of tight autocross hairpins. \\
Rotor Topology &amp; --- &amp; IPM &amp; Selected to achieve $L_q &gt; L_d$, enabling the harvest of "reluctance torque" to hit the 18 Nm target using less current (staying below the 107 A inverter limit). \\ \hline
\end{tabular}
\end{table}§svg§600§FALSE§</svg:desc></draw:frame></text:p>
      <text:h text:style-name="P15" text:outline-level="4"><text:soft-page-break/>Number Of Slots And Poles</text:h>
      <text:p text:style-name="P21">The general size of the motor is defined by:</text:p>
      <text:p text:style-name="P20"><draw:frame text:anchor-type="as-char" svg:y="-0.2571in" draw:z-index="29" draw:name="Shape6" draw:style-name="gr1" draw:text-style-name="P10" svg:width="1.4067in" svg:height="0.4016in"><draw:image xlink:href="Pictures/10004F8D00000BA0000003535B473429.svg" xlink:type="simple" xlink:show="embed" xlink:actuate="onLoad" draw:mime-type="image/svg+xml"><text:p/></draw:image><draw:image xlink:href="Pictures/100000010000007000000020A4CA4E4E.png" xlink:type="simple" xlink:show="embed" xlink:actuate="onLoad" draw:mime-type="image/png"/><svg:title>TexMaths</svg:title><svg:desc>12§display§\frac{D^2 L}{T_m} = \omega_0 T_m = \frac{P_r}{\omega}§svg§600§FALSE§</svg:desc></draw:frame></text:p>
      <text:p text:style-name="P22">Where: </text:p>
      <text:p text:style-name="P22">D: State bore diameter.</text:p>
      <text:p text:style-name="P22">L: Stator core length.</text:p>
      <text:p text:style-name="P22">T_m: Mechanical torque</text:p>
      <text:p text:style-name="P22">P_r: Output Power.</text:p>
      <text:p text:style-name="P22">\omega: Rotor Speed.</text:p>
      <text:p text:style-name="P22">\omega_0: Coefficient.</text:p>
      <text:h text:style-name="P15" text:outline-level="4">Sizing</text:h>
      <text:p text:style-name="P23">Ideally, the new design should keep the same dimensions as the previous machine, with the difference that it will be optimized in terms of heat and energy efficiency.</text:p>
      <text:p text:style-name="P24">$D^2L$</text:p>
      <text:h text:style-name="P25" text:outline-level="3"><text:bookmark-start text:name="__RefHeading___Toc1101_211697262"/>Part B: <text:span text:style-name="T1">Design Validation</text:span><text:bookmark-end text:name="__RefHeading___Toc1101_211697262"/></text:h>
      <text:p text:style-name="P26"><text:span text:style-name="T20">Here, using software, we implement the motor designed in </text:span><text:span text:style-name="T21">Part A </text:span><text:span text:style-name="T22">and perform electromechanical, thermal and mechanical simulations. The objective of this section is to validate the design in mutiple domains.</text:span></text:p>
      <text:h text:style-name="Heading_20_4" text:outline-level="4"><text:bookmark-start text:name="__RefHeading___Toc1103_211697262"/>Electromechanical Analysis<text:bookmark-end text:name="__RefHeading___Toc1103_211697262"/></text:h>
      <text:h text:style-name="Heading_20_4" text:outline-level="4"><text:bookmark-start text:name="__RefHeading___Toc1105_211697262"/>Thermal Analysis<text:bookmark-end text:name="__RefHeading___Toc1105_211697262"/></text:h>
      <text:h text:style-name="Heading_20_4" text:outline-level="4"><text:bookmark-start text:name="__RefHeading___Toc1107_211697262"/>Mechanical Analysis<text:bookmark-end text:name="__RefHeading___Toc1107_211697262"/></text:h>
      <text:h text:style-name="Heading_20_3" text:outline-level="3"><text:bookmark-start text:name="__RefHeading___Toc1597_211697262"/>Appendix<text:bookmark-end text:name="__RefHeading___Toc1597_211697262"/></text:h>
      <text:h text:style-name="Heading_20_4" text:outline-level="4"><text:span text:style-name="T23">Surface</text:span> Permanent Magnet (SPM) Machine</text:h>
      <text:p text:style-name="P21">This machine has permanent magnets pasted on the surface of the rotor. As the experiences speed, acceleration and temperature changes, the material used to hold this magnets in place should be really good! </text:p>
      <text:h text:style-name="P15" text:outline-level="4"><text:span text:style-name="T24">Interior </text:span>Permanent Magnet (<text:span text:style-name="T23">I</text:span>PM) Machine</text:h>
      <text:p text:style-name="P21">The magnets of this machine are “buried” inside the rotor structure. </text:p>
      <text:h text:style-name="Heading_20_4" text:outline-level="4"><text:bookmark-start text:name="__RefHeading___Toc1599_211697262"/><text:bookmark-start text:name="DD5-14-10-POW Datasheet"/>DD5-14-10-POW Datasheet<text:bookmark-end text:name="__RefHeading___Toc1599_211697262"/><text:bookmark-end text:name="DD5-14-10-POW Datasheet"/></text:h>
      <text:p text:style-name="P20"><text:soft-page-break/><draw:frame text:anchor-type="as-char" svg:y="-2.1909in" draw:z-index="19" draw:name="Shape2" draw:style-name="gr1" draw:text-style-name="P10" svg:width="6.5807in" svg:height="4.3823in"><draw:image xlink:href="Pictures/100A47AC000036680000243EF2FA5294.svg" xlink:type="simple" xlink:show="embed" xlink:actuate="onLoad" draw:mime-type="image/svg+xml"><text:p/></draw:image><draw:image xlink:href="Pictures/100000010000020E0000015F4DB0FCE3.png" xlink:type="simple" xlink:show="embed" xlink:actuate="onLoad" draw:mime-type="image/png"/><svg:title>TexMaths</svg:title><svg:desc>12§latex§\begin{table}[h!]
\centering
\caption{Baseline Motor Specifications and New Design Requirements}
\label{tab:motor_design_data}
\begin{tabular}{l l l r}
\hline
\textbf{Category} &amp; \textbf{Parameter} &amp; \textbf{Symbol} &amp; \textbf{Value (Unit)} \\ \hline
\textit{Baseline Motor} &amp; Model &amp; --- &amp; AMK DD5-14-10-POW  \\
&amp; Number of Poles &amp; $2p$ &amp; 10 poles  \\
&amp; Rated Power &amp; $P_n$ &amp; 12.3 kW  \\
&amp; Rated Speed &amp; $n_n$ &amp; 12,000 rpm  \\
&amp; Max Mechanical Speed &amp; $n_{max}$ &amp; 20,000 rpm  \\
&amp; Continuous Stall Torque &amp; $M_0$ &amp; 13.8 Nm  \\
&amp; Terminal Resistance &amp; $R_{tt}$ &amp; 0.135 $\Omega$  \\
&amp; d-axis Inductance &amp; $L_d$ &amp; 0.24 mH  \\
&amp; q-axis Inductance &amp; $L_q$ &amp; 0.12 mH  \\
&amp; Motor Mass &amp; $m$ &amp; 3.55 kg  \\ \hline
\textit{Inverter Constraints} &amp; Model &amp; --- &amp; AMK KW26-S5-FSE-4Q  \\
&amp; Peak Output Current &amp; $I_{max}$ &amp; 107 $A_{peak}$  \\
&amp; Rated Output Current &amp; $I_n$ &amp; 43 $A_{rms}$  \\
&amp; Nominal DC Bus Voltage &amp; $V_{dc}$ &amp; 515 V  \\
&amp; Max Switching Frequency &amp; $f_{sw}$ &amp; 8 kHz  \\ \hline
\textit{New Design Targets} &amp; Target Peak Power &amp; $P_{peak}$ &amp; 28 kW  \\
&amp; Clipped Peak Torque &amp; $M_{clip}$ &amp; 18 Nm  \\
&amp; Target Max Speed &amp; $n_{target}$ &amp; 12,000 rpm  \\
&amp; Gear Ratio (Fixed) &amp; $G$ &amp; 14:1  \\
&amp; Rotor Topology &amp; --- &amp; IPM (Interior PM)  \\ \hline
\end{tabular}
\end{table}§svg§600§FALSE§</svg:desc></draw:frame></text:p>
      <text:p text:style-name="P27"><draw:frame draw:style-name="fr4" draw:name="Image10" text:anchor-type="char" svg:x="0.0598in" svg:y="0in" svg:width="3.6016in" svg:height="2.0071in" draw:z-index="23"><draw:image xlink:href="Pictures/100000010000041800000248530F5387.png" xlink:type="simple" xlink:show="embed" xlink:actuate="onLoad" draw:mime-type="image/png"/></draw:frame><draw:frame draw:style-name="fr4" draw:name="Image11" text:anchor-type="char" svg:x="3.7634in" svg:y="0.1098in" svg:width="2.9055in" svg:height="1.4264in" draw:z-index="24"><draw:image xlink:href="Pictures/100000010000036E000001AFDC2FE047.png" xlink:type="simple" xlink:show="embed" xlink:actuate="onLoad" draw:mime-type="image/png"/></draw:frame></text:p>
      <text:h text:style-name="P28" text:outline-level="3"/>
      <text:h text:style-name="P28" text:outline-level="3"><text:bookmark-start text:name="__RefHeading___Toc254_211697262"/>Race <draw:frame draw:style-name="fr4" draw:name="Image12" text:anchor-type="char" svg:x="3.7374in" svg:y="1.4146in" svg:width="2.4772in" svg:height="2.4339in" draw:z-index="25"><draw:image xlink:href="Pictures/10000001000003580000034970E6B4ED.png" xlink:type="simple" xlink:show="embed" xlink:actuate="onLoad" draw:mime-type="image/png"/></draw:frame>Analysis Report<text:bookmark-end text:name="__RefHeading___Toc254_211697262"/></text:h>
      <text:p text:style-name="P29"/>
      <text:p text:style-name="Text_20_body"><draw:frame draw:style-name="fr5" draw:name="Image2" text:anchor-type="as-char" svg:y="-4.5146in" svg:width="4.9563in" svg:height="2.1362in" draw:z-index="1"><draw:image xlink:href="Pictures/10000000000006CA000002ED650F6C19.png" xlink:type="simple" xlink:show="embed" xlink:actuate="onLoad" draw:mime-type="image/png"/></draw:frame></text:p>
      <text:p text:style-name="P30">The 3 delimiters:</text:p>
      <text:p text:style-name="P30">1. A high torque low speed scenario happens <draw:frame draw:style-name="fr6" draw:name="Image1" text:anchor-type="char" svg:x="-0.1846in" svg:y="0.5646in" svg:width="5.1465in" svg:height="2.2173in" draw:z-index="0"><draw:image xlink:href="Pictures/10000000000006CA000002ED7762F77D.png" xlink:type="simple" xlink:show="embed" xlink:actuate="onLoad" draw:mime-type="image/png"/></draw:frame>always at the beginning of the race (when the car is stationary) or when passing through a steep slope. This scenario has very low back EMF <text:soft-page-break/>that resists the battery voltage, thus drawing high currents and generating massive heat (P=I^2*R). <text:s/>If the motor will be constantly exposed to this zone, it is key to prioritize for thermal mass and current capacity.</text:p>
      <text:p text:style-name="P30">2. A high speed low torque scenario happens when a flat or even a downwards slope is faced, and because the driver’s main objective is always to gain as much speed as possible, the motor’s electromechanical properties can become a limit. If the motor is expected to experience this scenario commonly, the design priorities should be focused on the low iron losses and field-weakening zone.</text:p>
      <text:p text:style-name="P31">3. A high speed high torque scenario happens when, although <text:span text:style-name="T25">t</text:span>he driver knows that the road conditions are not optimal, attempts to <text:span text:style-name="T25">maintain</text:span> <text:span text:style-name="T25">or even gain </text:span>speed. <text:span text:style-name="T25">Even if the car usually spends little time in this zone, it </text:span><text:span text:style-name="T26">should </text:span><text:span text:style-name="T27">be considered in the design, as one cannot allow an scenario where the external torque overcomes the motor and the car inevitably de-accelerates. </text:span><text:span text:style-name="T28">(really shouldn’t this be allowed?)</text:span></text:p>
      <text:p text:style-name="P32"><text:a xlink:type="simple" xlink:href="https://kthformulastudent.se/" text:style-name="Internet_20_link" text:visited-style-name="Visited_20_Internet_20_Link">kthformulastudent.se</text:a></text:p>
      <text:h text:style-name="P33" text:outline-level="3"><text:bookmark-start text:name="__RefHeading___Toc256_211697262"/>How Efficient Is The Current Motor?<text:bookmark-end text:name="__RefHeading___Toc256_211697262"/></text:h>
      <text:p text:style-name="Standard"><text:span text:style-name="T29">The rotor has glued surface-magnets. </text:span><text:span text:style-name="T30">SPM</text:span><text:span text:style-name="T31"> machine. </text:span><text:span text:style-name="T32">The motor has 10 poles. This number can be reduced. The electrical frequency would be reduced and higher efficiency would be reached. </text:span><text:span text:style-name="T33">The inverter tries to achieve up to 1.6 kHz frequency. A lot of lamination losses. This could reduce the acceleration efficiency, but the idea is to find a sweet spot.</text:span></text:p>
      <text:p text:style-name="P34">The Ld an Lq values are different () meaning that the motor is slightly anisotropic. <draw:frame draw:style-name="fr7" draw:name="Image7" text:anchor-type="char" svg:width="6.6929in" svg:height="4.0028in" draw:z-index="12"><draw:image xlink:href="Pictures/10000001000004F0000002F4869D2E68.png" xlink:type="simple" xlink:show="embed" xlink:actuate="onLoad" draw:mime-type="image/png"/></draw:frame></text:p>
      <text:h text:style-name="P35" text:outline-level="4"><draw:frame draw:style-name="fr8" draw:name="Image4" text:anchor-type="paragraph" svg:x="3.952in" svg:y="0.1083in" svg:width="2.3909in" svg:height="4.7047in" draw:z-index="4"><draw:image xlink:href="Pictures/1000000000000462000008A0FE2FE35A.jpg" xlink:type="simple" xlink:show="embed" xlink:actuate="onLoad" draw:mime-type="image/jpeg"/></draw:frame><draw:frame text:anchor-type="paragraph" draw:z-index="5" draw:name="Text Frame 1" draw:style-name="gr2" draw:text-style-name="P36" svg:width="0.6823in" svg:height="0.398in" svg:x="2.5126in" svg:y="0.55in"><draw:text-box><text:p>Teeth</text:p></draw:text-box></draw:frame><draw:frame text:anchor-type="paragraph" draw:z-index="6" draw:name="Text Frame 2" draw:style-name="gr3" draw:text-style-name="P36" svg:width="0.4406in" svg:height="0.2394in" svg:x="2.461in" svg:y="1.5402in"><draw:text-box><text:p>Slots</text:p></draw:text-box></draw:frame><draw:frame text:anchor-type="paragraph" draw:z-index="7" draw:name="Text Frame 3" draw:style-name="gr4" draw:text-style-name="P36" svg:width="0.9669in" svg:height="0.576in" svg:x="2.4575in" svg:y="2.1409in"><draw:text-box><text:p>Wire turns per slot: ~46</text:p></draw:text-box></draw:frame><draw:line text:anchor-type="paragraph" draw:z-index="8" draw:name="Line 1" draw:style-name="gr5" draw:text-style-name="P37" svg:x1="2.8244in" svg:y1="1.6646in" svg:x2="5.076in" svg:y2="1.8335in"><text:p/></draw:line><draw:line text:anchor-type="paragraph" draw:z-index="9" draw:name="Line 2" draw:style-name="gr5" draw:text-style-name="P37" svg:x1="2.9917in" svg:y1="0.7346in" svg:x2="5.9669in" svg:y2="1.7701in"><text:p/></draw:line><draw:line text:anchor-type="paragraph" draw:z-index="10" draw:name="Line 3" draw:style-name="gr5" draw:text-style-name="P37" svg:x1="3.378in" svg:y1="2.3701in" svg:x2="5.0898in" svg:y2="2.6035in"><text:p/></draw:line><text:bookmark-start text:name="__RefHeading___Toc258_211697262"/><draw:frame draw:style-name="fr4" draw:name="Image6" text:anchor-type="char" svg:x="3.8528in" svg:y="4.9425in" svg:width="2.4598in" svg:height="4.3728in" draw:z-index="11"><draw:image xlink:href="Pictures/100000000000087000000F001350AB50.jpg" xlink:type="simple" xlink:show="embed" xlink:actuate="onLoad" draw:mime-type="image/jpeg"/></draw:frame><text:soft-page-break/><draw:frame draw:style-name="fr9" draw:name="Frame1" text:anchor-type="as-char" svg:y="0.3283in" draw:z-index="2"><draw:text-box fo:min-height="0.0161in" fo:min-width="0.0161in"><text:p text:style-name="P38">The power distribution is 70% to the front wheels and 30% to the rear wheels.</text:p></draw:text-box></draw:frame><text:bookmark-end text:name="__RefHeading___Toc258_211697262"/></text:h>
      <text:p text:style-name="P39"/>
      <text:h text:style-name="P40" text:outline-level="4"><text:bookmark-start text:name="__RefHeading___Toc260_211697262"/>Ff<text:bookmark-end text:name="__RefHeading___Toc260_211697262"/></text:h>
      <text:h text:style-name="P41" text:outline-level="4"><text:bookmark-start text:name="__RefHeading___Toc262_211697262"/><draw:frame draw:style-name="fr4" draw:name="Image3" text:anchor-type="char" svg:x="-0.3453in" svg:y="0.0236in" svg:width="6.6929in" svg:height="5.3165in" draw:z-index="3"><draw:image xlink:href="Pictures/10000001000003A6000002E6736D771E.png" xlink:type="simple" xlink:show="embed" xlink:actuate="onLoad" draw:mime-type="image/png"/></draw:frame><text:line-break/><text:span text:style-name="T34">Requirements</text:span><text:bookmark-end text:name="__RefHeading___Toc262_211697262"/></text:h>
      <text:p text:style-name="P30">1.</text:p>
      <text:p text:style-name="P42">2. <text:s/></text:p>
      <text:p text:style-name="P43">2. The maximum power of the system shall not exceed 80 kW.</text:p>
      <text:p text:style-name="P43">3. The motor’s maximum power shall be 28 kW.</text:p>
      <text:p text:style-name="P43">4. The DC-bus maximum voltage shall be 600V. The nominal voltage should be 515 V.</text:p>
      <text:p text:style-name="P43">5. <text:span text:style-name="T35">The IP protection level shall be ???.</text:span></text:p>
      <text:p text:style-name="P44">6. The temperature limit shall be ???.</text:p>
      <text:p text:style-name="P44">7. Liquid cooling shall be used. <text:span text:style-name="T32">Air could be considered.</text:span></text:p>
      <text:p text:style-name="P30"><text:soft-page-break/>2. <text:span text:style-name="T25">The motor should operate in field-weakening </text:span><text:span text:style-name="T36">mode </text:span><text:span text:style-name="T25">when reaching it’s speed limits.</text:span></text:p>
      <text:p text:style-name="P45">3. <text:span text:style-name="T36">The motor type shall be of the </text:span><text:span text:style-name="T37">IPM </text:span><text:span text:style-name="T36">type. </text:span></text:p>
      <text:p text:style-name="P46">4. The maximum speed without field-weakening mode shall be ??? rpm.</text:p>
      <text:p text:style-name="P42">5. The maximum speed shall be 12,000 rpm.</text:p>
      <text:p text:style-name="P43">7. The torque-speed curve shall mimic the following example:</text:p>
      <text:p text:style-name="P47">8. The power split <text:span text:style-name="T38">between front and rear propulsion shall be ???.</text:span></text:p>
      <text:p text:style-name="P48">9. The max<text:span text:style-name="T39">imum </text:span>dimensions are 120 mm of outer diameter and 110 mm in length. This includes the liquid cooling.</text:p>
      <text:p text:style-name="P49">Mechanical power is defined as:</text:p>
      <text:p text:style-name="Text_20_body"><draw:frame text:anchor-type="as-char" svg:y="-0.0638in" draw:z-index="13" draw:name="Shape1" draw:style-name="gr1" draw:text-style-name="P10" svg:width="0.5598in" svg:height="0.128in"><draw:image xlink:href="Pictures/10000F98000004A30000010F9A477E1B.svg" xlink:type="simple" xlink:show="embed" xlink:actuate="onLoad" draw:mime-type="image/svg+xml"><text:p/></draw:image><draw:image xlink:href="Pictures/100000010000002D0000000AD0FC244F.png" xlink:type="simple" xlink:show="embed" xlink:actuate="onLoad" draw:mime-type="image/png"/><svg:title>TexMaths</svg:title><svg:desc>12§latex§P=\tau \cdot \omega§svg§600§FALSE§</svg:desc></draw:frame></text:p>
      <text:p text:style-name="P20"><draw:frame text:anchor-type="as-char" svg:y="-0.1244in" draw:z-index="14" draw:name="Shape2" draw:style-name="gr1" draw:text-style-name="P10" svg:width="2.8685in" svg:height="0.1594in"><draw:image xlink:href="Pictures/1000610F000017B600000152185201CD.svg" xlink:type="simple" xlink:show="embed" xlink:actuate="onLoad" draw:mime-type="image/svg+xml"><text:p/></draw:image><draw:image xlink:href="Pictures/10000001000000E50000000D4CE6E199.png" xlink:type="simple" xlink:show="embed" xlink:actuate="onLoad" draw:mime-type="image/png"/><svg:title>TexMaths</svg:title><svg:desc>12§display§$$P = 18 \cdot 1256.6 = 22,618 \text{ W} \approx 22.6 \text{ kW}$$§svg§600§FALSE§</svg:desc></draw:frame></text:p>
      <text:p text:style-name="P50">The motor is not 100% efficient, we need to represent the overall efficiency of the motor, gearbox and inverter ($n$).</text:p>
      <text:p text:style-name="P20"><draw:frame text:anchor-type="as-char" svg:y="-0.1492in" draw:z-index="15" draw:name="Shape3" draw:style-name="gr1" draw:text-style-name="P10" svg:width="0.9516in" svg:height="0.2303in"><draw:image xlink:href="Pictures/10003C57000007DD000001E85325AF2E.svg" xlink:type="simple" xlink:show="embed" xlink:actuate="onLoad" draw:mime-type="image/svg+xml"><text:p/></draw:image><draw:image xlink:href="Pictures/100000010000004C000000123382B319.png" xlink:type="simple" xlink:show="embed" xlink:actuate="onLoad" draw:mime-type="image/png"/><svg:title>TexMaths</svg:title><svg:desc>12§display§$$P_{elec} = \frac{P_{mech}}{\eta}$$§svg§600§FALSE§</svg:desc></draw:frame></text:p>
      <text:p text:style-name="P20"><draw:frame text:anchor-type="as-char" svg:y="-0.1417in" draw:z-index="16" draw:name="Shape4" draw:style-name="gr1" draw:text-style-name="P10" svg:width="2.1969in" svg:height="0.1996in"><draw:image xlink:href="Pictures/1000759E0000122B000001A7B5C770EA.svg" xlink:type="simple" xlink:show="embed" xlink:actuate="onLoad" draw:mime-type="image/svg+xml"><text:p/></draw:image><draw:image xlink:href="Pictures/10000001000000B000000010ED79FDBC.png" xlink:type="simple" xlink:show="embed" xlink:actuate="onLoad" draw:mime-type="image/png"/><svg:title>TexMaths</svg:title><svg:desc>12§display§$$P_{elec} = \frac{3}{2} \cdot V_{peak} \cdot I_{peak} \cdot \cos(\phi)$$§svg§600§FALSE§</svg:desc></draw:frame></text:p>
      <text:p text:style-name="P20"><draw:frame text:anchor-type="as-char" svg:y="-0.148in" draw:z-index="17" draw:name="Shape5" draw:style-name="gr1" draw:text-style-name="P10" svg:width="1.5232in" svg:height="0.2524in"><draw:image xlink:href="Pictures/100079CC00000C99000002182700FB88.svg" xlink:type="simple" xlink:show="embed" xlink:actuate="onLoad" draw:mime-type="image/svg+xml"><text:p/></draw:image><draw:image xlink:href="Pictures/100000010000007A00000014410144C9.png" xlink:type="simple" xlink:show="embed" xlink:actuate="onLoad" draw:mime-type="image/png"/><svg:title>TexMaths</svg:title><svg:desc>12§display§$$I_{peak} = \frac{2 \cdot P_{mech}}{\sqrt{3} \cdot V_{dc} \cdot \eta \cdot \cos(\phi)}$$§svg§600§FALSE§</svg:desc></draw:frame></text:p>
      <text:p text:style-name="P20"/>
      <text:p text:style-name="P51"><text:span text:style-name="T40">The previous images show </text:span><text:span text:style-name="T41">how the torque-speed relationship behaved during</text:span><text:span text:style-name="T40"> an Auto-</text:span><text:span text:style-name="T41">c</text:span><text:span text:style-name="T40">ross race. </text:span><text:span text:style-name="T41">The car has a fixed gear ratio, thus we can assume that the road </text:span><text:span text:style-name="T36">and driver interaction </text:span><text:span text:style-name="T41">is responsible for this speed-torque variations. The way to interpret this plot is basically observing that the zone that produces more stress </text:span><text:span text:style-name="T36">on</text:span><text:span text:style-name="T41"> the motor (higher draw of current, heat and mechanical stress) is when the torque and speed are high</text:span></text:p>
      <text:p text:style-name="P52">(for how long was this data recorded? What was the sampling frequency? Sensors used?<text:span text:style-name="T41">)</text:span></text:p>
      <text:p text:style-name="P53">Requirements Definition</text:p>
      <text:p text:style-name="P54">1. They have water cooling, can we get rid of it?</text:p>
      <text:p text:style-name="P54">2. If we remove that, we</text:p>
      <text:p text:style-name="P55">3. Use less magnets?</text:p>
      <text:p text:style-name="P55">4. Use outer dimensions as a constraint.</text:p>
      <text:p text:style-name="P55">5. <text:span text:style-name="T29">We are going from 24 to 28 kW. We should chose wha</text:span><text:span text:style-name="T42">t</text:span><text:span text:style-name="T29"> to “improve”, if we want to keep the same dimensions.</text:span></text:p>
      <text:p text:style-name="P56">The field weakening range is not so large. In a quick calculation, one can derive 20% is in this region (from 16 to 20 of the speed/Torque graph.</text:p>
      <text:p text:style-name="P56">We can consider changing from Surface Magnet to an Interior Permanent Magnet (where the magnets are inside), reducing the magnets and increasing the flux weakening region. Is more robust </text:p>
      <text:p text:style-name="P54">The Chasis</text:p>
      <text:p text:style-name="P54">The Motors</text:p>
      <text:p text:style-name="P54"/>
      <text:p text:style-name="P57">Design an IPM</text:p>
      <text:p text:style-name="P57"/>
      <text:p text:style-name="P57"><text:soft-page-break/></text:p>
      <text:p text:style-name="P57"><draw:frame draw:style-name="fr4" draw:name="Image8" text:anchor-type="char" svg:x="0.0354in" svg:y="0.0744in" svg:width="3.0598in" svg:height="2.8492in" draw:z-index="18"><draw:image xlink:href="Pictures/10000000000002AB0000027CE9D2DB84.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4T09:55:30.709249822</meta:creation-date>
    <dc:date>2026-05-02T14:49:35.557058023</dc:date>
    <meta:editing-duration>PT16H47M51S</meta:editing-duration>
    <meta:editing-cycles>41</meta:editing-cycles>
    <meta:generator>LibreOffice/25.2.3.2$Linux_X86_64 LibreOffice_project/520$Build-2</meta:generator>
    <meta:print-date>2026-04-29T12:33:48.774799470</meta:print-date>
    <meta:printed-by>PDF files</meta:printed-by>
    <meta:document-statistic meta:table-count="0" meta:image-count="12" meta:object-count="0" meta:page-count="9" meta:paragraph-count="103" meta:word-count="1137" meta:character-count="6715" meta:non-whitespace-character-count="5655"/>
  </office:meta>
</office:document-meta>
</file>